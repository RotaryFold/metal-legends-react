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genre</text:p>
          </table:table-cell>
          <table:table-cell office:value-type="string">
            <text:p>year</text:p>
          </table:table-cell>
          <table:table-cell office:value-type="string">
            <text:p>image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metallica</text:p>
          </table:table-cell>
          <table:table-cell office:value-type="string">
            <text:p>Metallica</text:p>
          </table:table-cell>
          <table:table-cell office:value-type="string">
            <text:p>Thrash metal</text:p>
          </table:table-cell>
          <table:table-cell office:value-type="float" office:value="1981">
            <text:p>1981</text:p>
          </table:table-cell>
          <table:table-cell office:value-type="string">
            <text:p>https://s3.abcstatics.com/abc/www/multimedia/cultura/2023/04/13/Metallica-R-ReoHPlfXn08hieR7JXNNOLK-1200x840@abc.jpeg</text:p>
          </table:table-cell>
          <table:table-cell office:value-type="string">
            <text:p>One of the biggest metal bands ever. Known for powerful riffs and iconic albums.</text:p>
          </table:table-cell>
        </table:table-row>
        <table:table-row>
          <table:table-cell office:value-type="string">
            <text:p>iron-maiden</text:p>
          </table:table-cell>
          <table:table-cell office:value-type="string">
            <text:p>Iron Maiden</text:p>
          </table:table-cell>
          <table:table-cell office:value-type="string">
            <text:p>Heavy metal</text:p>
          </table:table-cell>
          <table:table-cell office:value-type="float" office:value="1975">
            <text:p>1975</text:p>
          </table:table-cell>
          <table:table-cell office:value-type="string">
            <text:p>https://www.madnesslive.es/img/cms/posters/ironmaiden_2023_web.jpg</text:p>
          </table:table-cell>
          <table:table-cell office:value-type="string">
            <text:p>British heavy metal legends with epic storytelling and galloping basslines.</text:p>
          </table:table-cell>
        </table:table-row>
        <table:table-row>
          <table:table-cell office:value-type="string">
            <text:p>slayer</text:p>
          </table:table-cell>
          <table:table-cell office:value-type="string">
            <text:p>Slayer</text:p>
          </table:table-cell>
          <table:table-cell office:value-type="string">
            <text:p>Thrash metal</text:p>
          </table:table-cell>
          <table:table-cell office:value-type="float" office:value="1981">
            <text:p>1981</text:p>
          </table:table-cell>
          <table:table-cell office:value-type="string">
            <text:p>https://www.metal-archives.com/images/7/2/72_logo.png?1348</text:p>
          </table:table-cell>
          <table:table-cell office:value-type="string">
            <text:p>Extreme thrash pioneers, fast tempos and aggressive sound.</text:p>
          </table:table-cell>
        </table:table-row>
        <table:table-row>
          <table:table-cell office:value-type="string">
            <text:p>judas-priest</text:p>
          </table:table-cell>
          <table:table-cell office:value-type="string">
            <text:p>Judas Priest</text:p>
          </table:table-cell>
          <table:table-cell office:value-type="string">
            <text:p>Heavy metal</text:p>
          </table:table-cell>
          <table:table-cell office:value-type="float" office:value="1969">
            <text:p>1969</text:p>
          </table:table-cell>
          <table:table-cell office:value-type="string">
            <text:p>https://i.pinimg.com/736x/59/4c/24/594c2484cc427644bce08fa8cb2d2e8d.jpg</text:p>
          </table:table-cell>
          <table:table-cell office:value-type="string">
            <text:p>One of the most influential heavy metal bands. Leather, studs, and classic riff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